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 text:c="36"/>STUDENT MANAGEMENT SYSTEM</text:p>
      <text:p text:style-name="Normal">#include &lt;iostream&gt;</text:p>
      <text:p text:style-name="Normal">#include &lt;fstream&gt;</text:p>
      <text:p text:style-name="Normal">#include &lt;vector&gt;</text:p>
      <text:p text:style-name="Normal">#include &lt;string&gt;</text:p>
      <text:p text:style-name="Normal"/>
      <text:p text:style-name="Normal">using namespace std;</text:p>
      <text:p text:style-name="Normal"/>
      <text:p text:style-name="Normal">class Student {</text:p>
      <text:p text:style-name="Normal">public:</text:p>
      <text:p text:style-name="Normal"><text:s text:c="4"/>int id;</text:p>
      <text:p text:style-name="Normal"><text:s text:c="4"/>string name;</text:p>
      <text:p text:style-name="Normal"><text:s text:c="4"/>int age;</text:p>
      <text:p text:style-name="Normal"><text:s text:c="4"/>string branch;</text:p>
      <text:p text:style-name="Normal"/>
      <text:p text:style-name="Normal"><text:s text:c="4"/>void input() {</text:p>
      <text:p text:style-name="Normal"><text:s text:c="8"/>cout &lt;&lt; "\nEnter Student ID: ";</text:p>
      <text:p text:style-name="Normal"><text:s text:c="8"/>cin &gt;&gt; id;</text:p>
      <text:p text:style-name="Normal"/>
      <text:p text:style-name="Normal"><text:s text:c="8"/>cin.ignore();</text:p>
      <text:p text:style-name="Normal"/>
      <text:p text:style-name="Normal"><text:s text:c="8"/>cout &lt;&lt; "Enter Name: ";</text:p>
      <text:p text:style-name="Normal"><text:s text:c="8"/>getline(cin, name);</text:p>
      <text:p text:style-name="Normal"/>
      <text:p text:style-name="Normal"><text:s text:c="8"/>cout &lt;&lt; "Enter Age: ";</text:p>
      <text:p text:style-name="Normal"><text:s text:c="8"/>cin &gt;&gt; age;</text:p>
      <text:p text:style-name="Normal"/>
      <text:p text:style-name="Normal"><text:s text:c="8"/>cin.ignore();</text:p>
      <text:p text:style-name="Normal"/>
      <text:p text:style-name="Normal"><text:s text:c="8"/>cout &lt;&lt; "Enter Branch: ";</text:p>
      <text:p text:style-name="Normal"><text:s text:c="8"/>getline(cin, branch);</text:p>
      <text:p text:style-name="Normal"><text:s text:c="4"/>}</text:p>
      <text:p text:style-name="Normal"/>
      <text:p text:style-name="Normal"><text:s text:c="4"/>void display() {</text:p>
      <text:p text:style-name="Normal"><text:s text:c="8"/>cout &lt;&lt; "\n-------------------------";</text:p>
      <text:p text:style-name="Normal"><text:s text:c="8"/>cout &lt;&lt; "\nID <text:s text:c="5"/>: " &lt;&lt; id;</text:p>
      <text:p text:style-name="Normal"><text:s text:c="8"/>cout &lt;&lt; "\nName <text:s text:c="3"/>: " &lt;&lt; name;</text:p>
      <text:p text:style-name="Normal"><text:s text:c="8"/>cout &lt;&lt; "\nAge <text:s text:c="4"/>: " &lt;&lt; age;</text:p>
      <text:p text:style-name="Normal"><text:s text:c="8"/>cout &lt;&lt; "\nBranch <text:s/>: " &lt;&lt; branch;</text:p>
      <text:p text:style-name="Normal"><text:s text:c="8"/>cout &lt;&lt; "\n-------------------------\n";</text:p>
      <text:p text:style-name="Normal"><text:s text:c="4"/>}</text:p>
      <text:p text:style-name="Normal">};</text:p>
      <text:p text:style-name="Normal"/>
      <text:p text:style-name="Normal">vector&lt;Student&gt; students;</text:p>
      <text:p text:style-name="Normal"/>
      <text:p text:style-name="Normal">// Save all records to file</text:p>
      <text:p text:style-name="Normal">void saveToFile() {</text:p>
      <text:p text:style-name="Normal"><text:s text:c="4"/>ofstream file("students.txt");</text:p>
      <text:p text:style-name="Normal"/>
      <text:p text:style-name="Normal"><text:s text:c="4"/>for (auto s : students) {</text:p>
      <text:p text:style-name="Normal"><text:s text:c="8"/>file &lt;&lt; s.id &lt;&lt; endl;</text:p>
      <text:p text:style-name="Normal"><text:s text:c="8"/>file &lt;&lt; s.name &lt;&lt; endl;</text:p>
      <text:p text:style-name="Normal"><text:s text:c="8"/>file &lt;&lt; s.age &lt;&lt; endl;</text:p>
      <text:p text:style-name="Normal"><text:s text:c="8"/>file &lt;&lt; s.branch &lt;&lt; endl;</text:p>
      <text:p text:style-name="Normal"><text:s text:c="4"/>}</text:p>
      <text:p text:style-name="Normal"/>
      <text:p text:style-name="Normal"><text:s text:c="4"/>file.close();</text:p>
      <text:p text:style-name="Normal">}</text:p>
      <text:p text:style-name="Normal"/>
      <text:p text:style-name="Normal">// Load records from file</text:p>
      <text:p text:style-name="Normal">void loadFromFile() {</text:p>
      <text:p text:style-name="Normal"><text:s text:c="4"/>ifstream file("students.txt");</text:p>
      <text:p text:style-name="Normal"/>
      <text:p text:style-name="Normal"><text:s text:c="4"/>Student s;</text:p>
      <text:p text:style-name="Normal"/>
      <text:p text:style-name="Normal"><text:s text:c="4"/>while (file &gt;&gt; s.id) {</text:p>
      <text:p text:style-name="Normal"><text:s text:c="8"/>file.ignore();</text:p>
      <text:p text:style-name="Normal"/>
      <text:p text:style-name="Normal"><text:s text:c="8"/>getline(file, s.name);</text:p>
      <text:p text:style-name="Normal"/>
      <text:p text:style-name="Normal"><text:s text:c="8"/>file &gt;&gt; s.age;</text:p>
      <text:p text:style-name="Normal"><text:s text:c="8"/>file.ignore();</text:p>
      <text:p text:style-name="Normal"/>
      <text:p text:style-name="Normal"><text:s text:c="8"/>getline(file, s.branch);</text:p>
      <text:p text:style-name="Normal"/>
      <text:p text:style-name="Normal"><text:s text:c="8"/>students.push_back(s);</text:p>
      <text:p text:style-name="Normal"><text:s text:c="4"/>}</text:p>
      <text:p text:style-name="Normal"/>
      <text:p text:style-name="Normal"><text:s text:c="4"/>file.close();</text:p>
      <text:p text:style-name="Normal">}</text:p>
      <text:p text:style-name="Normal"/>
      <text:p text:style-name="Normal">// Add Student</text:p>
      <text:p text:style-name="Normal">void addStudent() {</text:p>
      <text:p text:style-name="Normal"><text:s text:c="4"/>Student s;</text:p>
      <text:p text:style-name="Normal"><text:s text:c="4"/>s.input();</text:p>
      <text:p text:style-name="Normal"/>
      <text:p text:style-name="Normal"><text:s text:c="4"/>students.push_back(s);</text:p>
      <text:p text:style-name="Normal"/>
      <text:p text:style-name="Normal"><text:s text:c="4"/>saveToFile();</text:p>
      <text:p text:style-name="Normal"/>
      <text:p text:style-name="Normal"><text:s text:c="4"/>cout &lt;&lt; "\nStudent Added Successfully!\n";</text:p>
      <text:p text:style-name="Normal">}</text:p>
      <text:p text:style-name="Normal"/>
      <text:p text:style-name="Normal">// Display Students</text:p>
      <text:p text:style-name="Normal">void displayStudents() {</text:p>
      <text:p text:style-name="Normal"><text:s text:c="4"/>if (students.empty()) {</text:p>
      <text:p text:style-name="Normal"><text:s text:c="8"/>cout &lt;&lt; "\nNo Records Found!\n";</text:p>
      <text:p text:style-name="Normal"><text:s text:c="8"/>return;</text:p>
      <text:p text:style-name="Normal"><text:s text:c="4"/>}</text:p>
      <text:p text:style-name="Normal"/>
      <text:p text:style-name="Normal"><text:s text:c="4"/>for (auto s : students) {</text:p>
      <text:p text:style-name="Normal"><text:s text:c="8"/>s.display();</text:p>
      <text:p text:style-name="Normal"><text:s text:c="4"/>}</text:p>
      <text:p text:style-name="Normal">}</text:p>
      <text:p text:style-name="Normal"/>
      <text:p text:style-name="Normal">// Search Student</text:p>
      <text:p text:style-name="Normal">void searchStudent() {</text:p>
      <text:p text:style-name="Normal"><text:s text:c="4"/>int id;</text:p>
      <text:p text:style-name="Normal"/>
      <text:p text:style-name="Normal"><text:s text:c="4"/>cout &lt;&lt; "\nEnter Student ID to Search: ";</text:p>
      <text:p text:style-name="Normal"><text:s text:c="4"/>cin &gt;&gt; id;</text:p>
      <text:p text:style-name="Normal"/>
      <text:p text:style-name="Normal"><text:s text:c="4"/>for (auto s : students) {</text:p>
      <text:p text:style-name="Normal"><text:s text:c="8"/>if (s.id == id) {</text:p>
      <text:p text:style-name="Normal"><text:s text:c="12"/>cout &lt;&lt; "\nStudent Found!\n";</text:p>
      <text:p text:style-name="Normal"><text:s text:c="12"/>s.display();</text:p>
      <text:p text:style-name="Normal"><text:s text:c="12"/>return;</text:p>
      <text:p text:style-name="Normal"><text:s text:c="8"/>}</text:p>
      <text:p text:style-name="Normal"><text:s text:c="4"/>}</text:p>
      <text:p text:style-name="Normal"/>
      <text:p text:style-name="Normal"><text:s text:c="4"/>cout &lt;&lt; "\nStudent Not Found!\n";</text:p>
      <text:p text:style-name="Normal">}</text:p>
      <text:p text:style-name="Normal"/>
      <text:p text:style-name="Normal">// Update Student</text:p>
      <text:p text:style-name="Normal">void updateStudent() {</text:p>
      <text:p text:style-name="Normal"><text:s text:c="4"/>int id;</text:p>
      <text:p text:style-name="Normal"/>
      <text:p text:style-name="Normal"><text:s text:c="4"/>cout &lt;&lt; "\nEnter Student ID to Update: ";</text:p>
      <text:p text:style-name="Normal"><text:s text:c="4"/>cin &gt;&gt; id;</text:p>
      <text:p text:style-name="Normal"/>
      <text:p text:style-name="Normal"><text:s text:c="4"/>for (auto &amp;s : students) {</text:p>
      <text:p text:style-name="Normal"><text:s text:c="8"/>if (s.id == id) {</text:p>
      <text:p text:style-name="Normal"/>
      <text:p text:style-name="Normal"><text:s text:c="12"/>cout &lt;&lt; "\nEnter New Details:\n";</text:p>
      <text:p text:style-name="Normal"><text:s text:c="12"/>s.input();</text:p>
      <text:p text:style-name="Normal"/>
      <text:p text:style-name="Normal"><text:s text:c="12"/>saveToFile();</text:p>
      <text:p text:style-name="Normal"/>
      <text:p text:style-name="Normal"><text:s text:c="12"/>cout &lt;&lt; "\nRecord Updated Successfully!\n";</text:p>
      <text:p text:style-name="Normal"><text:s text:c="12"/>return;</text:p>
      <text:p text:style-name="Normal"><text:s text:c="8"/>}</text:p>
      <text:p text:style-name="Normal"><text:s text:c="4"/>}</text:p>
      <text:p text:style-name="Normal"/>
      <text:p text:style-name="Normal"><text:s text:c="4"/>cout &lt;&lt; "\nStudent Not Found!\n";</text:p>
      <text:p text:style-name="Normal">}</text:p>
      <text:p text:style-name="Normal"/>
      <text:p text:style-name="Normal">// Delete Student</text:p>
      <text:p text:style-name="Normal">void deleteStudent() {</text:p>
      <text:p text:style-name="Normal"><text:s text:c="4"/>int id;</text:p>
      <text:p text:style-name="Normal"/>
      <text:p text:style-name="Normal"><text:s text:c="4"/>cout &lt;&lt; "\nEnter Student ID to Delete: ";</text:p>
      <text:p text:style-name="Normal"><text:s text:c="4"/>cin &gt;&gt; id;</text:p>
      <text:p text:style-name="Normal"/>
      <text:p text:style-name="Normal"><text:s text:c="4"/>for (int i = 0; i &lt; students.size(); i++) {</text:p>
      <text:p text:style-name="Normal"/>
      <text:p text:style-name="Normal"><text:s text:c="8"/>if (students[i].id == id) {</text:p>
      <text:p text:style-name="Normal"/>
      <text:p text:style-name="Normal"><text:s text:c="12"/>students.erase(students.begin() + i);</text:p>
      <text:p text:style-name="Normal"/>
      <text:p text:style-name="Normal"><text:s text:c="12"/>saveToFile();</text:p>
      <text:p text:style-name="Normal"/>
      <text:p text:style-name="Normal"><text:s text:c="12"/>cout &lt;&lt; "\nStudent Deleted Successfully!\n";</text:p>
      <text:p text:style-name="Normal"><text:s text:c="12"/>return;</text:p>
      <text:p text:style-name="Normal"><text:s text:c="8"/>}</text:p>
      <text:p text:style-name="Normal"><text:s text:c="4"/>}</text:p>
      <text:p text:style-name="Normal"/>
      <text:p text:style-name="Normal"><text:s text:c="4"/>cout &lt;&lt; "\nStudent Not Found!\n";</text:p>
      <text:p text:style-name="Normal">}</text:p>
      <text:p text:style-name="Normal"/>
      <text:p text:style-name="Normal">int main() {</text:p>
      <text:p text:style-name="Normal"/>
      <text:p text:style-name="Normal"><text:s text:c="4"/>loadFromFile();</text:p>
      <text:p text:style-name="Normal"/>
      <text:p text:style-name="Normal"><text:s text:c="4"/>int choice;</text:p>
      <text:p text:style-name="Normal"/>
      <text:p text:style-name="Normal"><text:s text:c="4"/>do {</text:p>
      <text:p text:style-name="Normal"><text:s text:c="8"/>cout &lt;&lt; "\n========== STUDENT MANAGEMENT SYSTEM ==========\n";</text:p>
      <text:p text:style-name="Normal"><text:s text:c="8"/>cout &lt;&lt; "1. Add Student\n";</text:p>
      <text:p text:style-name="Normal"><text:s text:c="8"/>cout &lt;&lt; "2. Display All Students\n";</text:p>
      <text:p text:style-name="Normal"><text:s text:c="8"/>cout &lt;&lt; "3. Search Student\n";</text:p>
      <text:p text:style-name="Normal"><text:s text:c="8"/>cout &lt;&lt; "4. Update Student\n";</text:p>
      <text:p text:style-name="Normal"><text:s text:c="8"/>cout &lt;&lt; "5. Delete Student\n";</text:p>
      <text:p text:style-name="Normal"><text:s text:c="8"/>cout &lt;&lt; "6. Exit\n";</text:p>
      <text:p text:style-name="Normal"/>
      <text:p text:style-name="Normal"><text:s text:c="8"/>cout &lt;&lt; "\nEnter Your Choice: ";</text:p>
      <text:p text:style-name="Normal"><text:s text:c="8"/>cin &gt;&gt; choice;</text:p>
      <text:p text:style-name="Normal"/>
      <text:p text:style-name="Normal"><text:s text:c="8"/>switch (choice) {</text:p>
      <text:p text:style-name="Normal"/>
      <text:p text:style-name="Normal"><text:s text:c="8"/>case 1:</text:p>
      <text:p text:style-name="Normal"><text:s text:c="12"/>addStudent();</text:p>
      <text:p text:style-name="Normal"><text:s text:c="12"/>break;</text:p>
      <text:p text:style-name="Normal"/>
      <text:p text:style-name="Normal"><text:s text:c="8"/>case 2:</text:p>
      <text:p text:style-name="Normal"><text:s text:c="12"/>displayStudents();</text:p>
      <text:p text:style-name="Normal"><text:s text:c="12"/>break;</text:p>
      <text:p text:style-name="Normal"/>
      <text:p text:style-name="Normal"><text:s text:c="8"/>case 3:</text:p>
      <text:p text:style-name="Normal"><text:s text:c="12"/>searchStudent();</text:p>
      <text:p text:style-name="Normal"><text:s text:c="12"/>break;</text:p>
      <text:p text:style-name="Normal"/>
      <text:p text:style-name="Normal"><text:s text:c="8"/>case 4:</text:p>
      <text:p text:style-name="Normal"><text:s text:c="12"/>updateStudent();</text:p>
      <text:p text:style-name="Normal"><text:s text:c="12"/>break;</text:p>
      <text:p text:style-name="Normal"/>
      <text:p text:style-name="Normal"><text:s text:c="8"/>case 5:</text:p>
      <text:p text:style-name="Normal"><text:s text:c="12"/>deleteStudent();</text:p>
      <text:p text:style-name="Normal"><text:s text:c="12"/>break;</text:p>
      <text:p text:style-name="Normal"/>
      <text:p text:style-name="Normal"><text:s text:c="8"/>case 6:</text:p>
      <text:p text:style-name="Normal"><text:s text:c="12"/>cout &lt;&lt; "\nThank You!\n";</text:p>
      <text:p text:style-name="Normal"><text:s text:c="12"/>break;</text:p>
      <text:p text:style-name="Normal"/>
      <text:p text:style-name="Normal"><text:s text:c="8"/>default:</text:p>
      <text:p text:style-name="Normal"><text:s text:c="12"/>cout &lt;&lt; "\nInvalid Choice!\n";</text:p>
      <text:p text:style-name="Normal"><text:s text:c="8"/>}</text:p>
      <text:p text:style-name="Normal"/>
      <text:p text:style-name="Normal"><text:s text:c="4"/>} while (choice != 6);</text:p>
      <text:p text:style-name="Normal"/>
      <text:p text:style-name="Normal"><text:s text:c="4"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ndana Nimmala</meta:initial-creator>
    <dc:creator>Vandana Nimmala</dc:creator>
    <meta:creation-date>2026-05-31T06:10:00Z</meta:creation-date>
    <dc:date>2026-05-31T06:10:00Z</dc:date>
    <meta:template xlink:href="Normal.dotm" xlink:type="simple"/>
    <meta:editing-cycles>2</meta:editing-cycles>
    <meta:editing-duration>PT0S</meta:editing-duration>
    <meta:document-statistic meta:page-count="1" meta:paragraph-count="7" meta:word-count="585" meta:character-count="3915" meta:row-count="27" meta:non-whitespace-character-count="3337"/>
  </office:meta>
</office:document-meta>
</file>